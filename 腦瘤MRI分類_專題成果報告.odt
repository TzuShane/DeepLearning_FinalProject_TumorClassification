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B0000002582B061145.png" manifest:media-type="image/png"/>
  <manifest:file-entry manifest:full-path="Pictures/10000001000004B0000002583379272B.png" manifest:media-type="image/png"/>
  <manifest:file-entry manifest:full-path="Pictures/1000000100000384000002EE4DB4F3EE.png" manifest:media-type="image/png"/>
  <manifest:file-entry manifest:full-path="Pictures/1000000100000384000002EE5528F487.png" manifest:media-type="image/png"/>
  <manifest:file-entry manifest:full-path="Pictures/10000001000004B0000002583E003496.png" manifest:media-type="image/png"/>
  <manifest:file-entry manifest:full-path="Pictures/1000000100000384000002EEAC21BA79.png" manifest:media-type="image/png"/>
  <manifest:file-entry manifest:full-path="Pictures/1000000100000384000002EE3BF08EEA.png" manifest:media-type="image/png"/>
  <manifest:file-entry manifest:full-path="Pictures/1000000100000708000002A3255F0327.png" manifest:media-type="image/png"/>
  <manifest:file-entry manifest:full-path="Pictures/10000001000004B0000002580A84C252.png" manifest:media-type="image/png"/>
  <manifest:file-entry manifest:full-path="Pictures/1000000100000384000002EE045AF48B.png" manifest:media-type="image/png"/>
  <manifest:file-entry manifest:full-path="Pictures/1000000100000708000002A3F0654303.png" manifest:media-type="image/png"/>
  <manifest:file-entry manifest:full-path="Pictures/1000000100000708000002A39EB9CD1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OpenSymbol" svg:font-family="OpenSymbol" style:font-charset="x-symbol"/>
  </office:font-face-decls>
  <office:automatic-styles>
    <style:style style:name="表格1" style:family="table">
      <style:table-properties style:width="15.875cm" fo:margin-left="0.009cm" fo:margin-top="0cm" fo:margin-bottom="0cm" table:align="left" style:writing-mode="page"/>
    </style:style>
    <style:style style:name="表格1.A" style:family="table-column">
      <style:table-column-properties style:column-width="7.938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f4e79" fo:padding-left="0.176cm" fo:padding-right="0.176cm" fo:padding-top="0.106cm" fo:padding-bottom="0.106cm" fo:border="0.5pt solid #000000">
        <style:background-image/>
      </style:table-cell-properties>
    </style:style>
    <style:style style:name="表格1.A2" style:family="table-cell">
      <style:table-cell-properties fo:padding-left="0.176cm" fo:padding-right="0.176cm" fo:padding-top="0.106cm" fo:padding-bottom="0.106cm" fo:border="0.5pt solid #000000"/>
    </style:style>
    <style:style style:name="表格1.B2" style:family="table-cell">
      <style:table-cell-properties fo:padding-left="0.176cm" fo:padding-right="0.176cm" fo:padding-top="0.106cm" fo:padding-bottom="0.106cm" fo:border="0.5pt solid #000000"/>
    </style:style>
    <style:style style:name="表格1.A3" style:family="table-cell">
      <style:table-cell-properties fo:padding-left="0.176cm" fo:padding-right="0.176cm" fo:padding-top="0.106cm" fo:padding-bottom="0.106cm" fo:border="0.5pt solid #000000"/>
    </style:style>
    <style:style style:name="表格1.B3" style:family="table-cell">
      <style:table-cell-properties fo:padding-left="0.176cm" fo:padding-right="0.176cm" fo:padding-top="0.106cm" fo:padding-bottom="0.106cm" fo:border="0.5pt solid #000000"/>
    </style:style>
    <style:style style:name="表格1.A4" style:family="table-cell">
      <style:table-cell-properties fo:padding-left="0.176cm" fo:padding-right="0.176cm" fo:padding-top="0.106cm" fo:padding-bottom="0.106cm" fo:border="0.5pt solid #000000"/>
    </style:style>
    <style:style style:name="表格1.B4" style:family="table-cell">
      <style:table-cell-properties fo:padding-left="0.176cm" fo:padding-right="0.176cm" fo:padding-top="0.106cm" fo:padding-bottom="0.106cm" fo:border="0.5pt solid #000000"/>
    </style:style>
    <style:style style:name="表格1.A5" style:family="table-cell">
      <style:table-cell-properties fo:padding-left="0.176cm" fo:padding-right="0.176cm" fo:padding-top="0.106cm" fo:padding-bottom="0.106cm" fo:border="0.5pt solid #000000"/>
    </style:style>
    <style:style style:name="表格1.B5" style:family="table-cell">
      <style:table-cell-properties fo:padding-left="0.176cm" fo:padding-right="0.176cm" fo:padding-top="0.106cm" fo:padding-bottom="0.106cm" fo:border="0.5pt solid #000000"/>
    </style:style>
    <style:style style:name="表格1.A6" style:family="table-cell">
      <style:table-cell-properties fo:padding-left="0.176cm" fo:padding-right="0.176cm" fo:padding-top="0.106cm" fo:padding-bottom="0.106cm" fo:border="0.5pt solid #000000"/>
    </style:style>
    <style:style style:name="表格1.B6" style:family="table-cell">
      <style:table-cell-properties fo:padding-left="0.176cm" fo:padding-right="0.176cm" fo:padding-top="0.106cm" fo:padding-bottom="0.106cm" fo:border="0.5pt solid #000000"/>
    </style:style>
    <style:style style:name="表格2" style:family="table">
      <style:table-properties style:width="15.875cm" fo:margin-left="0.009cm" fo:margin-top="0cm" fo:margin-bottom="0cm" table:align="left" style:writing-mode="page"/>
    </style:style>
    <style:style style:name="表格2.A" style:family="table-column">
      <style:table-column-properties style:column-width="3.35cm"/>
    </style:style>
    <style:style style:name="表格2.B" style:family="table-column">
      <style:table-column-properties style:column-width="2.295cm"/>
    </style:style>
    <style:style style:name="表格2.C" style:family="table-column">
      <style:table-column-properties style:column-width="2.293cm"/>
    </style:style>
    <style:style style:name="表格2.D" style:family="table-column">
      <style:table-column-properties style:column-width="2.291cm"/>
    </style:style>
    <style:style style:name="表格2.E" style:family="table-column">
      <style:table-column-properties style:column-width="2.822cm"/>
    </style:style>
    <style:style style:name="表格2.F" style:family="table-column">
      <style:table-column-properties style:column-width="2.824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1f4e79" fo:padding-left="0.176cm" fo:padding-right="0.176cm" fo:padding-top="0.106cm" fo:padding-bottom="0.106cm" fo:border="0.5pt solid #000000">
        <style:background-image/>
      </style:table-cell-properties>
    </style:style>
    <style:style style:name="表格2.A2" style:family="table-cell">
      <style:table-cell-properties fo:padding-left="0.176cm" fo:padding-right="0.176cm" fo:padding-top="0.106cm" fo:padding-bottom="0.106cm" fo:border="0.5pt solid #000000"/>
    </style:style>
    <style:style style:name="表格2.B2" style:family="table-cell">
      <style:table-cell-properties fo:padding-left="0.176cm" fo:padding-right="0.176cm" fo:padding-top="0.106cm" fo:padding-bottom="0.106cm" fo:border="0.5pt solid #000000"/>
    </style:style>
    <style:style style:name="表格2.C2" style:family="table-cell">
      <style:table-cell-properties fo:padding-left="0.176cm" fo:padding-right="0.176cm" fo:padding-top="0.106cm" fo:padding-bottom="0.106cm" fo:border="0.5pt solid #000000"/>
    </style:style>
    <style:style style:name="表格2.D2" style:family="table-cell">
      <style:table-cell-properties fo:padding-left="0.176cm" fo:padding-right="0.176cm" fo:padding-top="0.106cm" fo:padding-bottom="0.106cm" fo:border="0.5pt solid #000000"/>
    </style:style>
    <style:style style:name="表格2.E2" style:family="table-cell">
      <style:table-cell-properties fo:padding-left="0.176cm" fo:padding-right="0.176cm" fo:padding-top="0.106cm" fo:padding-bottom="0.106cm" fo:border="0.5pt solid #000000"/>
    </style:style>
    <style:style style:name="表格2.F2" style:family="table-cell">
      <style:table-cell-properties fo:padding-left="0.176cm" fo:padding-right="0.176cm" fo:padding-top="0.106cm" fo:padding-bottom="0.106cm" fo:border="0.5pt solid #000000"/>
    </style:style>
    <style:style style:name="表格2.A3" style:family="table-cell">
      <style:table-cell-properties fo:padding-left="0.176cm" fo:padding-right="0.176cm" fo:padding-top="0.106cm" fo:padding-bottom="0.106cm" fo:border="0.5pt solid #000000"/>
    </style:style>
    <style:style style:name="表格2.B3" style:family="table-cell">
      <style:table-cell-properties fo:padding-left="0.176cm" fo:padding-right="0.176cm" fo:padding-top="0.106cm" fo:padding-bottom="0.106cm" fo:border="0.5pt solid #000000"/>
    </style:style>
    <style:style style:name="表格2.C3" style:family="table-cell">
      <style:table-cell-properties fo:padding-left="0.176cm" fo:padding-right="0.176cm" fo:padding-top="0.106cm" fo:padding-bottom="0.106cm" fo:border="0.5pt solid #000000"/>
    </style:style>
    <style:style style:name="表格2.D3" style:family="table-cell">
      <style:table-cell-properties fo:padding-left="0.176cm" fo:padding-right="0.176cm" fo:padding-top="0.106cm" fo:padding-bottom="0.106cm" fo:border="0.5pt solid #000000"/>
    </style:style>
    <style:style style:name="表格2.E3" style:family="table-cell">
      <style:table-cell-properties fo:padding-left="0.176cm" fo:padding-right="0.176cm" fo:padding-top="0.106cm" fo:padding-bottom="0.106cm" fo:border="0.5pt solid #000000"/>
    </style:style>
    <style:style style:name="表格2.F3" style:family="table-cell">
      <style:table-cell-properties fo:padding-left="0.176cm" fo:padding-right="0.176cm" fo:padding-top="0.106cm" fo:padding-bottom="0.106cm" fo:border="0.5pt solid #000000"/>
    </style:style>
    <style:style style:name="表格2.A4" style:family="table-cell">
      <style:table-cell-properties fo:padding-left="0.176cm" fo:padding-right="0.176cm" fo:padding-top="0.106cm" fo:padding-bottom="0.106cm" fo:border="0.5pt solid #000000"/>
    </style:style>
    <style:style style:name="表格2.B4" style:family="table-cell">
      <style:table-cell-properties fo:padding-left="0.176cm" fo:padding-right="0.176cm" fo:padding-top="0.106cm" fo:padding-bottom="0.106cm" fo:border="0.5pt solid #000000"/>
    </style:style>
    <style:style style:name="表格2.C4" style:family="table-cell">
      <style:table-cell-properties fo:padding-left="0.176cm" fo:padding-right="0.176cm" fo:padding-top="0.106cm" fo:padding-bottom="0.106cm" fo:border="0.5pt solid #000000"/>
    </style:style>
    <style:style style:name="表格2.D4" style:family="table-cell">
      <style:table-cell-properties fo:padding-left="0.176cm" fo:padding-right="0.176cm" fo:padding-top="0.106cm" fo:padding-bottom="0.106cm" fo:border="0.5pt solid #000000"/>
    </style:style>
    <style:style style:name="表格2.E4" style:family="table-cell">
      <style:table-cell-properties fo:padding-left="0.176cm" fo:padding-right="0.176cm" fo:padding-top="0.106cm" fo:padding-bottom="0.106cm" fo:border="0.5pt solid #000000"/>
    </style:style>
    <style:style style:name="表格2.F4" style:family="table-cell">
      <style:table-cell-properties fo:padding-left="0.176cm" fo:padding-right="0.176cm" fo:padding-top="0.106cm" fo:padding-bottom="0.106cm" fo:border="0.5pt solid #000000"/>
    </style:style>
    <style:style style:name="表格2.A5" style:family="table-cell">
      <style:table-cell-properties fo:padding-left="0.176cm" fo:padding-right="0.176cm" fo:padding-top="0.106cm" fo:padding-bottom="0.106cm" fo:border="0.5pt solid #000000"/>
    </style:style>
    <style:style style:name="表格2.B5" style:family="table-cell">
      <style:table-cell-properties fo:padding-left="0.176cm" fo:padding-right="0.176cm" fo:padding-top="0.106cm" fo:padding-bottom="0.106cm" fo:border="0.5pt solid #000000"/>
    </style:style>
    <style:style style:name="表格2.C5" style:family="table-cell">
      <style:table-cell-properties fo:padding-left="0.176cm" fo:padding-right="0.176cm" fo:padding-top="0.106cm" fo:padding-bottom="0.106cm" fo:border="0.5pt solid #000000"/>
    </style:style>
    <style:style style:name="表格2.D5" style:family="table-cell">
      <style:table-cell-properties fo:padding-left="0.176cm" fo:padding-right="0.176cm" fo:padding-top="0.106cm" fo:padding-bottom="0.106cm" fo:border="0.5pt solid #000000"/>
    </style:style>
    <style:style style:name="表格2.E5" style:family="table-cell">
      <style:table-cell-properties fo:padding-left="0.176cm" fo:padding-right="0.176cm" fo:padding-top="0.106cm" fo:padding-bottom="0.106cm" fo:border="0.5pt solid #000000"/>
    </style:style>
    <style:style style:name="表格2.F5" style:family="table-cell">
      <style:table-cell-properties fo:padding-left="0.176cm" fo:padding-right="0.176cm" fo:padding-top="0.106cm" fo:padding-bottom="0.106cm" fo:border="0.5pt solid #000000"/>
    </style:style>
    <style:style style:name="表格3" style:family="table">
      <style:table-properties style:width="15.875cm" fo:margin-left="0.009cm" fo:margin-top="0cm" fo:margin-bottom="0cm" table:align="left" style:writing-mode="page"/>
    </style:style>
    <style:style style:name="表格3.A" style:family="table-column">
      <style:table-column-properties style:column-width="4.586cm"/>
    </style:style>
    <style:style style:name="表格3.B" style:family="table-column">
      <style:table-column-properties style:column-width="2.822cm"/>
    </style:style>
    <style:style style:name="表格3.C" style:family="table-column">
      <style:table-column-properties style:column-width="2.82cm"/>
    </style:style>
    <style:style style:name="表格3.E" style:family="table-column">
      <style:table-column-properties style:column-width="2.824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1f4e79" fo:padding-left="0.176cm" fo:padding-right="0.176cm" fo:padding-top="0.106cm" fo:padding-bottom="0.106cm" fo:border="0.5pt solid #000000">
        <style:background-image/>
      </style:table-cell-properties>
    </style:style>
    <style:style style:name="表格3.A2" style:family="table-cell">
      <style:table-cell-properties fo:padding-left="0.176cm" fo:padding-right="0.176cm" fo:padding-top="0.106cm" fo:padding-bottom="0.106cm" fo:border="0.5pt solid #000000"/>
    </style:style>
    <style:style style:name="表格3.B2" style:family="table-cell">
      <style:table-cell-properties fo:padding-left="0.176cm" fo:padding-right="0.176cm" fo:padding-top="0.106cm" fo:padding-bottom="0.106cm" fo:border="0.5pt solid #000000"/>
    </style:style>
    <style:style style:name="表格3.C2" style:family="table-cell">
      <style:table-cell-properties fo:padding-left="0.176cm" fo:padding-right="0.176cm" fo:padding-top="0.106cm" fo:padding-bottom="0.106cm" fo:border="0.5pt solid #000000"/>
    </style:style>
    <style:style style:name="表格3.D2" style:family="table-cell">
      <style:table-cell-properties fo:padding-left="0.176cm" fo:padding-right="0.176cm" fo:padding-top="0.106cm" fo:padding-bottom="0.106cm" fo:border="0.5pt solid #000000"/>
    </style:style>
    <style:style style:name="表格3.E2" style:family="table-cell">
      <style:table-cell-properties fo:padding-left="0.176cm" fo:padding-right="0.176cm" fo:padding-top="0.106cm" fo:padding-bottom="0.106cm" fo:border="0.5pt solid #000000"/>
    </style:style>
    <style:style style:name="表格3.A3" style:family="table-cell">
      <style:table-cell-properties fo:padding-left="0.176cm" fo:padding-right="0.176cm" fo:padding-top="0.106cm" fo:padding-bottom="0.106cm" fo:border="0.5pt solid #000000"/>
    </style:style>
    <style:style style:name="表格3.B3" style:family="table-cell">
      <style:table-cell-properties fo:padding-left="0.176cm" fo:padding-right="0.176cm" fo:padding-top="0.106cm" fo:padding-bottom="0.106cm" fo:border="0.5pt solid #000000"/>
    </style:style>
    <style:style style:name="表格3.C3" style:family="table-cell">
      <style:table-cell-properties fo:padding-left="0.176cm" fo:padding-right="0.176cm" fo:padding-top="0.106cm" fo:padding-bottom="0.106cm" fo:border="0.5pt solid #000000"/>
    </style:style>
    <style:style style:name="表格3.D3" style:family="table-cell">
      <style:table-cell-properties fo:padding-left="0.176cm" fo:padding-right="0.176cm" fo:padding-top="0.106cm" fo:padding-bottom="0.106cm" fo:border="0.5pt solid #000000"/>
    </style:style>
    <style:style style:name="表格3.E3" style:family="table-cell">
      <style:table-cell-properties fo:padding-left="0.176cm" fo:padding-right="0.176cm" fo:padding-top="0.106cm" fo:padding-bottom="0.106cm" fo:border="0.5pt solid #000000"/>
    </style:style>
    <style:style style:name="表格3.A4" style:family="table-cell">
      <style:table-cell-properties fo:padding-left="0.176cm" fo:padding-right="0.176cm" fo:padding-top="0.106cm" fo:padding-bottom="0.106cm" fo:border="0.5pt solid #000000"/>
    </style:style>
    <style:style style:name="表格3.B4" style:family="table-cell">
      <style:table-cell-properties fo:padding-left="0.176cm" fo:padding-right="0.176cm" fo:padding-top="0.106cm" fo:padding-bottom="0.106cm" fo:border="0.5pt solid #000000"/>
    </style:style>
    <style:style style:name="表格3.C4" style:family="table-cell">
      <style:table-cell-properties fo:padding-left="0.176cm" fo:padding-right="0.176cm" fo:padding-top="0.106cm" fo:padding-bottom="0.106cm" fo:border="0.5pt solid #000000"/>
    </style:style>
    <style:style style:name="表格3.D4" style:family="table-cell">
      <style:table-cell-properties fo:padding-left="0.176cm" fo:padding-right="0.176cm" fo:padding-top="0.106cm" fo:padding-bottom="0.106cm" fo:border="0.5pt solid #000000"/>
    </style:style>
    <style:style style:name="表格3.E4" style:family="table-cell">
      <style:table-cell-properties fo:padding-left="0.176cm" fo:padding-right="0.176cm" fo:padding-top="0.106cm" fo:padding-bottom="0.106cm" fo:border="0.5pt solid #000000"/>
    </style:style>
    <style:style style:name="表格3.A5" style:family="table-cell">
      <style:table-cell-properties fo:padding-left="0.176cm" fo:padding-right="0.176cm" fo:padding-top="0.106cm" fo:padding-bottom="0.106cm" fo:border="0.5pt solid #000000"/>
    </style:style>
    <style:style style:name="表格3.B5" style:family="table-cell">
      <style:table-cell-properties fo:padding-left="0.176cm" fo:padding-right="0.176cm" fo:padding-top="0.106cm" fo:padding-bottom="0.106cm" fo:border="0.5pt solid #000000"/>
    </style:style>
    <style:style style:name="表格3.C5" style:family="table-cell">
      <style:table-cell-properties fo:padding-left="0.176cm" fo:padding-right="0.176cm" fo:padding-top="0.106cm" fo:padding-bottom="0.106cm" fo:border="0.5pt solid #000000"/>
    </style:style>
    <style:style style:name="表格3.D5" style:family="table-cell">
      <style:table-cell-properties fo:padding-left="0.176cm" fo:padding-right="0.176cm" fo:padding-top="0.106cm" fo:padding-bottom="0.106cm" fo:border="0.5pt solid #000000"/>
    </style:style>
    <style:style style:name="表格3.E5" style:family="table-cell">
      <style:table-cell-properties fo:padding-left="0.176cm" fo:padding-right="0.176cm" fo:padding-top="0.106cm" fo:padding-bottom="0.106cm" fo:border="0.5pt solid #000000"/>
    </style:style>
    <style:style style:name="表格4" style:family="table">
      <style:table-properties style:width="15.875cm" fo:margin-left="0cm" fo:margin-top="0cm" fo:margin-bottom="0cm" table:align="left" style:writing-mode="page"/>
    </style:style>
    <style:style style:name="表格4.A" style:family="table-column">
      <style:table-column-properties style:column-width="7.938cm"/>
    </style:style>
    <style:style style:name="表格4.1" style:family="table-row">
      <style:table-row-properties fo:keep-together="auto"/>
    </style:style>
    <style:style style:name="表格4.A1" style:family="table-cell">
      <style:table-cell-properties fo:padding-left="0.191cm" fo:padding-right="0.191cm" fo:padding-top="0cm" fo:padding-bottom="0cm" fo:border="none"/>
    </style:style>
    <style:style style:name="表格5" style:family="table">
      <style:table-properties style:width="15.875cm" fo:margin-left="0cm" fo:margin-top="0cm" fo:margin-bottom="0cm" table:align="left" style:writing-mode="page"/>
    </style:style>
    <style:style style:name="表格5.A" style:family="table-column">
      <style:table-column-properties style:column-width="7.938cm"/>
    </style:style>
    <style:style style:name="表格5.1" style:family="table-row">
      <style:table-row-properties fo:keep-together="auto"/>
    </style:style>
    <style:style style:name="表格5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.141cm" fo:margin-bottom="0.053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.035cm" style:contextual-spacing="false" fo:text-align="center" style:justify-single-word="false"/>
    </style:style>
    <style:style style:name="P3" style:family="paragraph" style:parent-style-name="Standard">
      <style:paragraph-properties fo:margin-top="2.469cm" fo:margin-bottom="0cm" style:contextual-spacing="false" fo:text-align="center" style:justify-single-word="false"/>
      <style:text-properties officeooo:paragraph-rsid="0001453b"/>
    </style:style>
    <style:style style:name="P4" style:family="paragraph" style:parent-style-name="Standard">
      <style:paragraph-properties fo:margin-top="0.212cm" fo:margin-bottom="0cm" style:contextual-spacing="false" fo:text-align="center" style:justify-single-word="false"/>
    </style:style>
    <style:style style:name="P5" style:family="paragraph" style:parent-style-name="Standard">
      <style:paragraph-properties fo:margin-top="0cm" fo:margin-bottom="0.071cm" style:contextual-spacing="false" fo:line-height="0.487cm">
        <style:tab-stops>
          <style:tab-stop style:position="15.91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0.741cm" fo:margin-top="0cm" fo:margin-bottom="0.071cm" style:contextual-spacing="false" fo:line-height="0.487cm">
        <style:tab-stops>
          <style:tab-stop style:position="15.91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top="0cm" fo:margin-bottom="0.229cm" style:contextual-spacing="false" fo:line-height="0.529cm" fo:text-align="justify" style:justify-single-word="false"/>
    </style:style>
    <style:style style:name="P8" style:family="paragraph" style:parent-style-name="Standard">
      <style:paragraph-properties fo:margin-top="0cm" fo:margin-bottom="0.353cm" style:contextual-spacing="false" fo:break-before="page"/>
      <style:text-properties fo:color="#1f4e79" loext:opacity="100%" style:font-name="Microsoft JhengHei" fo:font-size="15pt" fo:font-weight="bold" style:font-name-asian="Microsoft JhengHei1" style:font-size-asian="15pt" style:font-weight-asian="bold" style:font-name-complex="Microsoft JhengHei1" style:font-size-complex="15pt" style:font-weight-complex="bold"/>
    </style:style>
    <style:style style:name="P9" style:family="paragraph" style:parent-style-name="Standard">
      <style:paragraph-properties fo:margin-top="3.175cm" fo:margin-bottom="0cm" style:contextual-spacing="false" fo:text-align="center" style:justify-single-word="false"/>
      <style:text-properties fo:color="#1f4e79" loext:opacity="100%" style:font-name="Microsoft JhengHei" fo:font-size="24pt" fo:font-weight="bold" style:font-name-asian="Microsoft JhengHei1" style:font-size-asian="24pt" style:font-weight-asian="bold" style:font-name-complex="Microsoft JhengHei1" style:font-size-complex="24pt" style:font-weight-complex="bold"/>
    </style:style>
    <style:style style:name="P10" style:family="paragraph" style:parent-style-name="Standard">
      <style:paragraph-properties fo:margin-top="0cm" fo:margin-bottom="0.229cm" style:contextual-spacing="false" fo:line-height="0.529cm" fo:text-align="justify" style:justify-single-word="false"/>
      <style:text-properties style:font-name="Microsoft JhengHei" fo:font-size="11pt" style:font-name-asian="Microsoft JhengHei1" style:font-size-asian="11pt" style:font-name-complex="Microsoft JhengHei1" style:font-size-complex="11pt"/>
    </style:style>
    <style:style style:name="P11" style:family="paragraph" style:parent-style-name="Standard">
      <style:paragraph-properties fo:margin-top="0cm" fo:margin-bottom="0.229cm" style:contextual-spacing="false" fo:line-height="0.529cm" fo:text-align="justify" style:justify-single-word="false"/>
      <style:text-properties style:font-name="Microsoft JhengHei" fo:font-size="11pt" officeooo:paragraph-rsid="0003a43c" style:font-name-asian="Microsoft JhengHei1" style:font-size-asian="11pt" style:font-name-complex="Microsoft JhengHei1" style:font-size-complex="11pt"/>
    </style:style>
    <style:style style:name="P12" style:family="paragraph" style:parent-style-name="Standard">
      <style:paragraph-properties fo:margin-top="0cm" fo:margin-bottom="0.229cm" style:contextual-spacing="false" fo:line-height="0.529cm" fo:text-align="justify" style:justify-single-word="false"/>
      <style:text-properties style:font-name="Microsoft JhengHei" fo:font-size="11pt" officeooo:paragraph-rsid="0007ec9c" style:font-name-asian="Microsoft JhengHei1" style:font-size-asian="11pt" style:font-name-complex="Microsoft JhengHei1" style:font-size-complex="11pt"/>
    </style:style>
    <style:style style:name="P13" style:family="paragraph" style:parent-style-name="Standard">
      <style:paragraph-properties fo:margin-top="0.706cm" fo:margin-bottom="0cm" style:contextual-spacing="false" fo:text-align="center" style:justify-single-word="false"/>
      <style:text-properties style:font-name="Microsoft JhengHei" fo:font-size="15pt" fo:font-weight="bold" style:font-name-asian="Microsoft JhengHei1" style:font-size-asian="15pt" style:font-weight-asian="bold" style:font-name-complex="Microsoft JhengHei1" style:font-size-complex="15pt" style:font-weight-complex="bold"/>
    </style:style>
    <style:style style:name="P14" style:family="paragraph" style:parent-style-name="Standard">
      <style:paragraph-properties fo:margin-top="0.106cm" fo:margin-bottom="0cm" style:contextual-spacing="false" fo:text-align="center" style:justify-single-word="false"/>
      <style:text-properties style:font-name="Microsoft JhengHei" fo:font-size="15pt" fo:font-weight="bold" style:font-name-asian="Microsoft JhengHei1" style:font-size-asian="15pt" style:font-weight-asian="bold" style:font-name-complex="Microsoft JhengHei1" style:font-size-complex="15pt" style:font-weight-complex="bold"/>
    </style:style>
    <style:style style:name="P15" style:family="paragraph" style:parent-style-name="Standard">
      <style:paragraph-properties fo:margin-top="0.212cm" fo:margin-bottom="0cm" style:contextual-spacing="false" fo:text-align="center" style:justify-single-word="false"/>
      <style:text-properties style:font-name="Microsoft JhengHei" fo:font-size="12pt" style:font-name-asian="Microsoft JhengHei1" style:font-size-asian="12pt" style:font-name-complex="Microsoft JhengHei1" style:font-size-complex="12pt"/>
    </style:style>
    <style:style style:name="P16" style:family="paragraph" style:parent-style-name="Standard">
      <style:paragraph-properties fo:margin-left="0.847cm" fo:margin-top="0cm" fo:margin-bottom="0.141cm" style:contextual-spacing="false" fo:line-height="0.494cm" fo:text-indent="-0.847cm" style:auto-text-indent="false"/>
      <style:text-properties style:font-name="Microsoft JhengHei" fo:font-size="10pt" style:font-name-asian="Microsoft JhengHei1" style:font-size-asian="10pt" style:font-name-complex="Microsoft JhengHei1" style:font-size-complex="10pt"/>
    </style:style>
    <style:style style:name="P17" style:family="paragraph" style:parent-style-name="Standard">
      <style:paragraph-properties fo:margin-top="0.353cm" fo:margin-bottom="0cm" style:contextual-spacing="false" fo:text-align="center" style:justify-single-word="false"/>
      <style:text-properties fo:color="#595959" loext:opacity="100%" style:font-name="Microsoft JhengHei" fo:font-size="11pt" fo:font-style="italic" style:font-name-asian="Microsoft JhengHei1" style:font-size-asian="11pt" style:font-style-asian="italic" style:font-name-complex="Microsoft JhengHei1" style:font-size-complex="11pt" style:font-style-complex="italic"/>
    </style:style>
    <style:style style:name="P18" style:family="paragraph" style:parent-style-name="Standard">
      <style:paragraph-properties fo:margin-top="0.071cm" fo:margin-bottom="0cm" style:contextual-spacing="false" fo:text-align="center" style:justify-single-word="false"/>
      <style:text-properties fo:color="#595959" loext:opacity="100%" style:font-name="Microsoft JhengHei" fo:font-size="11pt" fo:font-style="italic" officeooo:paragraph-rsid="0001453b" style:font-name-asian="Microsoft JhengHei1" style:font-size-asian="11pt" style:font-style-asian="italic" style:font-name-complex="Microsoft JhengHei1" style:font-size-complex="11pt" style:font-style-complex="italic"/>
    </style:style>
    <style:style style:name="P19" style:family="paragraph" style:parent-style-name="Standard">
      <style:paragraph-properties fo:margin-top="0.071cm" fo:margin-bottom="0cm" style:contextual-spacing="false" fo:text-align="center" style:justify-single-word="false"/>
      <style:text-properties fo:color="#595959" loext:opacity="100%" style:font-name="Microsoft JhengHei" fo:font-size="11pt" fo:font-style="normal" officeooo:paragraph-rsid="000a69f2" style:font-name-asian="Microsoft JhengHei1" style:font-size-asian="11pt" style:font-style-asian="normal" style:font-name-complex="Microsoft JhengHei1" style:font-size-complex="11pt" style:font-style-complex="normal"/>
    </style:style>
    <style:style style:name="P20" style:family="paragraph" style:parent-style-name="Standard">
      <style:paragraph-properties fo:margin-top="0.071cm" fo:margin-bottom="0.318cm" style:contextual-spacing="false" fo:text-align="center" style:justify-single-word="false"/>
      <style:text-properties fo:color="#595959" loext:opacity="100%" style:font-name="Microsoft JhengHei" fo:font-size="9pt" fo:font-style="italic" style:font-name-asian="Microsoft JhengHei1" style:font-size-asian="9pt" style:font-style-asian="italic" style:font-name-complex="Microsoft JhengHei1" style:font-size-complex="9pt" style:font-style-complex="italic"/>
    </style:style>
    <style:style style:name="P21" style:family="paragraph" style:parent-style-name="Standard">
      <style:paragraph-properties fo:margin-top="0cm" fo:margin-bottom="0.106cm" style:contextual-spacing="false" fo:text-align="center" style:justify-single-word="false"/>
      <style:text-properties fo:color="#595959" loext:opacity="100%" style:font-name="Microsoft JhengHei" fo:font-size="8pt" fo:font-style="italic" style:font-name-asian="Microsoft JhengHei1" style:font-size-asian="8pt" style:font-style-asian="italic" style:font-name-complex="Microsoft JhengHei1" style:font-size-complex="8pt" style:font-style-complex="italic"/>
    </style:style>
    <style:style style:name="P22" style:family="paragraph" style:parent-style-name="Standard">
      <style:paragraph-properties fo:text-align="start" style:justify-single-word="false"/>
      <style:text-properties fo:color="#ffffff" loext:opacity="100%" style:font-name="Microsoft JhengHei" fo:font-size="10pt" fo:font-weight="bold" style:font-name-asian="Microsoft JhengHei1" style:font-size-asian="10pt" style:font-weight-asian="bold" style:font-name-complex="Microsoft JhengHei1" style:font-size-complex="10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fffff" loext:opacity="100%" style:font-name="Microsoft JhengHei" fo:font-size="10pt" fo:font-weight="bold" style:font-name-asian="Microsoft JhengHei1" style:font-size-asian="10pt" style:font-weight-asian="bold" style:font-name-complex="Microsoft JhengHei1" style:font-size-complex="10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Microsoft JhengHei" fo:font-size="10pt" fo:font-weight="bold" style:font-name-asian="Microsoft JhengHei1" style:font-size-asian="10pt" style:font-weight-asian="bold" style:font-name-complex="Microsoft JhengHei1" style:font-size-complex="10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style:font-name="Microsoft JhengHei" fo:font-size="10pt" fo:font-weight="normal" style:font-name-asian="Microsoft JhengHei1" style:font-size-asian="10pt" style:font-weight-asian="normal" style:font-name-complex="Microsoft JhengHei1" style:font-size-complex="10pt" style:font-weight-complex="normal"/>
    </style:style>
    <style:style style:name="P26" style:family="paragraph" style:parent-style-name="Heading_20_2" style:list-style-name="">
      <style:paragraph-properties fo:margin-top="0.318cm" fo:margin-bottom="0.159cm" style:contextual-spacing="false"/>
      <style:text-properties fo:color="#2e5a8a" loext:opacity="100%" style:font-name="Microsoft JhengHei" fo:font-size="12.5pt" fo:font-weight="bold" style:font-name-asian="Microsoft JhengHei1" style:font-size-asian="12.5pt" style:font-weight-asian="bold" style:font-name-complex="Microsoft JhengHei1" style:font-size-complex="12.5pt" style:font-weight-complex="bold"/>
    </style:style>
    <style:style style:name="P27" style:family="paragraph" style:parent-style-name="Heading_20_1" style:list-style-name="">
      <style:paragraph-properties fo:margin-top="0cm" fo:margin-bottom="0.212cm" style:contextual-spacing="false" fo:break-before="page"/>
      <style:text-properties fo:color="#1f4e79" loext:opacity="100%" style:font-name="Microsoft JhengHei" fo:font-size="15pt" fo:font-weight="bold" style:font-name-asian="Microsoft JhengHei1" style:font-size-asian="15pt" style:font-weight-asian="bold" style:font-name-complex="Microsoft JhengHei1" style:font-size-complex="15pt" style:font-weight-complex="bold"/>
    </style:style>
    <style:style style:name="P28" style:family="paragraph" style:parent-style-name="Heading_20_1" style:list-style-name="">
      <style:paragraph-properties fo:margin-top="0.459cm" fo:margin-bottom="0.212cm" style:contextual-spacing="false"/>
      <style:text-properties fo:color="#1f4e79" loext:opacity="100%" style:font-name="Microsoft JhengHei" fo:font-size="15pt" fo:font-weight="bold" style:font-name-asian="Microsoft JhengHei1" style:font-size-asian="15pt" style:font-weight-asian="bold" style:font-name-complex="Microsoft JhengHei1" style:font-size-complex="15pt" style:font-weight-complex="bold"/>
    </style:style>
    <style:style style:name="P29" style:family="paragraph" style:parent-style-name="Heading_20_1" style:list-style-name="">
      <style:paragraph-properties fo:margin-top="0.459cm" fo:margin-bottom="0.212cm" style:contextual-spacing="false"/>
    </style:style>
    <style:style style:name="P30" style:family="paragraph" style:parent-style-name="List_20_Paragraph" style:list-style-name="WWNum2">
      <style:paragraph-properties fo:margin-top="0cm" fo:margin-bottom="0.123cm" style:contextual-spacing="false" fo:line-height="0.512cm"/>
      <style:text-properties style:font-name="Microsoft JhengHei" fo:font-size="11pt" style:font-name-asian="Microsoft JhengHei1" style:font-size-asian="11pt" style:font-name-complex="Microsoft JhengHei1" style:font-size-complex="11pt"/>
    </style:style>
    <style:style style:name="T1" style:family="text">
      <style:text-properties fo:color="#1f4e79" loext:opacity="100%" style:font-name="Microsoft JhengHei" fo:font-size="15pt" fo:font-weight="bold" style:font-name-asian="Microsoft JhengHei1" style:font-size-asian="15pt" style:font-weight-asian="bold" style:font-name-complex="Microsoft JhengHei1" style:font-size-complex="15pt" style:font-weight-complex="bold"/>
    </style:style>
    <style:style style:name="T2" style:family="text">
      <style:text-properties style:font-name="Microsoft JhengHei" fo:font-size="12pt" style:font-name-asian="Microsoft JhengHei1" style:font-size-asian="12pt" style:font-name-complex="Microsoft JhengHei1" style:font-size-complex="12pt"/>
    </style:style>
    <style:style style:name="T3" style:family="text">
      <style:text-properties style:font-name="Microsoft JhengHei" fo:font-size="12pt" officeooo:rsid="0001453b" style:font-name-asian="Microsoft JhengHei1" style:font-size-asian="12pt" style:font-name-complex="Microsoft JhengHei1" style:font-size-complex="12pt"/>
    </style:style>
    <style:style style:name="T4" style:family="text">
      <style:text-properties style:font-name="Microsoft JhengHei" fo:font-size="11pt" fo:font-weight="bold" style:font-name-asian="Microsoft JhengHei1" style:font-size-asian="11pt" style:font-weight-asian="bold" style:font-name-complex="Microsoft JhengHei1" style:font-size-complex="11pt" style:font-weight-complex="bold"/>
    </style:style>
    <style:style style:name="T5" style:family="text">
      <style:text-properties style:font-name="Microsoft JhengHei" fo:font-size="11pt" style:font-name-asian="Microsoft JhengHei1" style:font-size-asian="11pt" style:font-name-complex="Microsoft JhengHei1" style:font-size-complex="11pt"/>
    </style:style>
    <style:style style:name="T6" style:family="text">
      <style:text-properties style:font-name="Microsoft JhengHei" style:font-name-asian="Microsoft JhengHei1" style:font-name-complex="Microsoft JhengHei1"/>
    </style:style>
    <style:style style:name="T7" style:family="text">
      <style:text-properties style:font-name="Microsoft JhengHei" fo:font-size="10.5pt" fo:font-weight="normal" style:font-name-asian="Microsoft JhengHei1" style:font-size-asian="10.5pt" style:font-weight-asian="normal" style:font-name-complex="Microsoft JhengHei1" style:font-size-complex="10.5pt" style:font-weight-complex="normal"/>
    </style:style>
    <style:style style:name="T8" style:family="text">
      <style:text-properties officeooo:rsid="000bc769"/>
    </style:style>
    <style:style style:name="T9" style:family="text">
      <style:text-properties officeooo:rsid="000cfa1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深度學習期末專題成果報告</text:p>
      <text:p text:style-name="P13">基於遷移學習與可解釋性之</text:p>
      <text:p text:style-name="P14">腦部 MRI 腫瘤分類</text:p>
      <text:p text:style-name="P17">A Transfer-Learning and Explainability Approach to</text:p>
      <text:p text:style-name="P18">Brain Tumor Classification on MRI</text:p>
      <text:p text:style-name="P3"><text:span text:style-name="T2">學生：黃子軒　　 <text:s text:c="3"/>學號：</text:span><text:span text:style-name="T3">214952079</text:span></text:p>
      <text:p text:style-name="P15">課程：深度學習　　指導教授：杜岳錡</text:p>
      <text:p text:style-name="P4"><text:span text:style-name="T2">日期：</text:span><text:span text:style-name="T3">2026</text:span><text:span text:style-name="T2">年</text:span><text:span text:style-name="T3">7</text:span><text:span text:style-name="T2">月</text:span><text:span text:style-name="T3">5</text:span><text:span text:style-name="T2">日</text:span></text:p>
      <text:p text:style-name="P4"><text:span text:style-name="T2"/></text:p>
      <text:p text:style-name="P19">程式碼：<text:a xlink:type="simple" xlink:href="https://github.com/TzuShane/DeepLearning_FinalProject_TumorClassification" text:style-name="Internet_20_link" text:visited-style-name="Visited_20_Internet_20_Link">https://github.com/TzuShane/DeepLearning_FinalProject_TumorClassification</text:a></text:p>
      <text:p text:style-name="Standard"/>
      <text:p text:style-name="P8">目次</text:p>
      <text:p text:style-name="P5"><text:span text:style-name="T4">1　摘要</text:span><text:span text:style-name="T6"><text:tab/></text:span><text:span text:style-name="T4">3</text:span></text:p>
      <text:p text:style-name="P5"><text:span text:style-name="T4">2　緒論</text:span><text:span text:style-name="T6"><text:tab/></text:span><text:span text:style-name="T4">3</text:span></text:p>
      <text:p text:style-name="P6"><text:span text:style-name="T7">2.1　研究背景與動機</text:span><text:span text:style-name="T6"><text:tab/></text:span><text:span text:style-name="T7">3</text:span></text:p>
      <text:p text:style-name="P6"><text:span text:style-name="T7">2.2　問題定義</text:span><text:span text:style-name="T6"><text:tab/></text:span><text:span text:style-name="T7">3</text:span></text:p>
      <text:p text:style-name="P6"><text:span text:style-name="T7">2.3　研究目標與貢獻</text:span><text:span text:style-name="T6"><text:tab/></text:span><text:span text:style-name="T7">3</text:span></text:p>
      <text:p text:style-name="P5"><text:span text:style-name="T4">3　相關研究</text:span><text:span text:style-name="T6"><text:tab/></text:span><text:span text:style-name="T4">3</text:span></text:p>
      <text:p text:style-name="P6"><text:span text:style-name="T7">3.1　卷積神經網路架構演進</text:span><text:span text:style-name="T6"><text:tab/></text:span><text:span text:style-name="T7">3</text:span></text:p>
      <text:p text:style-name="P6"><text:span text:style-name="T7">3.2　遷移學習</text:span><text:span text:style-name="T6"><text:tab/></text:span><text:span text:style-name="T7">4</text:span></text:p>
      <text:p text:style-name="P6"><text:span text:style-name="T7">3.3　模型可解釋性與 Grad-CAM</text:span><text:span text:style-name="T6"><text:tab/></text:span><text:span text:style-name="T7">4</text:span></text:p>
      <text:p text:style-name="P5"><text:span text:style-name="T4">4　資料集與實驗設定</text:span><text:span text:style-name="T6"><text:tab/></text:span><text:span text:style-name="T4">4</text:span></text:p>
      <text:p text:style-name="P6"><text:span text:style-name="T7">4.1　資料來源與類別</text:span><text:span text:style-name="T6"><text:tab/></text:span><text:span text:style-name="T7">4</text:span></text:p>
      <text:p text:style-name="P6"><text:span text:style-name="T7">4.2　訓練設定</text:span><text:span text:style-name="T6"><text:tab/></text:span><text:span text:style-name="T7">4</text:span></text:p>
      <text:p text:style-name="P6"><text:span text:style-name="T7">4.3　硬體環境</text:span><text:span text:style-name="T6"><text:tab/></text:span><text:span text:style-name="T7">4</text:span></text:p>
      <text:p text:style-name="P5"><text:span text:style-name="T4">5　實驗結果與分析</text:span><text:span text:style-name="T6"><text:tab/></text:span><text:span text:style-name="T4">5</text:span></text:p>
      <text:p text:style-name="P6"><text:span text:style-name="T7">5.1　整體效能比較</text:span><text:span text:style-name="T6"><text:tab/></text:span><text:span text:style-name="T7">5</text:span></text:p>
      <text:p text:style-name="P6"><text:span text:style-name="T7">5.2　訓練與收斂行為</text:span><text:span text:style-name="T6"><text:tab/></text:span><text:span text:style-name="T7">5</text:span></text:p>
      <text:p text:style-name="P6"><text:span text:style-name="T7">5.3　逐類別表現與混淆矩陣</text:span><text:span text:style-name="T6"><text:tab/></text:span><text:span text:style-name="T7">6</text:span></text:p>
      <text:p text:style-name="P6"><text:span text:style-name="T7">5.4　ROC 分析</text:span><text:span text:style-name="T6"><text:tab/></text:span><text:span text:style-name="T7">7</text:span></text:p>
      <text:p text:style-name="P6"><text:span text:style-name="T7">5.5　可解釋性分析（Grad-CAM）</text:span><text:span text:style-name="T6"><text:tab/></text:span><text:span text:style-name="T7">8</text:span></text:p>
      <text:p text:style-name="P5"><text:span text:style-name="T4">6　討論</text:span><text:span text:style-name="T6"><text:tab/></text:span><text:span text:style-name="T4">9</text:span></text:p>
      <text:p text:style-name="P6"><text:span text:style-name="T7">6.1　glioma 難以辨識的可能原因</text:span><text:span text:style-name="T6"><text:tab/></text:span><text:span text:style-name="T7">9</text:span></text:p>
      <text:p text:style-name="P6"><text:span text:style-name="T7">6.2　準確率與效率的取捨</text:span><text:span text:style-name="T6"><text:tab/></text:span><text:span text:style-name="T7">9</text:span></text:p>
      <text:p text:style-name="P6"><text:span text:style-name="T7">6.3　兩階段微調的有效性</text:span><text:span text:style-name="T6"><text:tab/></text:span><text:span text:style-name="T7">9</text:span></text:p>
      <text:p text:style-name="P6"><text:span text:style-name="T7">6.4　限制與未來工作</text:span><text:span text:style-name="T6"><text:tab/></text:span><text:span text:style-name="T7">9</text:span></text:p>
      <text:p text:style-name="P5"><text:span text:style-name="T4">7　結論</text:span><text:span text:style-name="T6"><text:tab/></text:span><text:span text:style-name="T4">9</text:span></text:p>
      <text:p text:style-name="P5"><text:span text:style-name="T4">8　程式碼可得性</text:span><text:span text:style-name="T6"><text:tab/></text:span><text:span text:style-name="T4">10</text:span></text:p>
      <text:p text:style-name="P5"><text:span text:style-name="T4">參考文獻</text:span><text:span text:style-name="T6"><text:tab/></text:span><text:span text:style-name="T4">10</text:span></text:p>
      <text:p text:style-name="Standard"/>
      <text:h text:style-name="P27" text:outline-level="1">1　摘要</text:h>
      <text:p text:style-name="P10">本專題以腦部磁振造影（MRI）影像為對象，建立自動辨識腦瘤類型的深度學習系統，分類目標為神經膠質瘤（glioma）、腦膜瘤（meningioma）、腦垂體瘤（pituitary）與無腫瘤（no tumor）四類，測試集每類 400 張、共 1600 張。專題研究中系統性地比較了自建 baseline CNN 與三種預訓練架構（ResNet50、DenseNet121、EfficientNet-B0），探討其在準確率、參數量與推論速度上的取捨。為了穩定訓練過程，採用兩階段微調策略，並凍結批次正規化統計量。此外，本專題也導入 Grad-CAM 技術，將模型判斷依據視覺化，以提升結果的可解釋性。實驗結果顯示，遷移學習相較從頭訓練帶來顯著提升——最佳的 DenseNet121 達到 94.0% 測試準確率與 0.985 的 macro AUC，遠高於 baseline 的 71.1%。進一步的逐類別分析發現，glioma 是所有模型一致最難辨識的類別（最佳召回率僅約 79%），且主要被誤判為 meningioma，此現象與該資料集 glioma 類別已知的標註疑慮相互呼應。訓練曲線圖也清楚呈現兩階段微調在解凍後帶來的顯著準確率提升。</text:p>
      <text:h text:style-name="P28" text:outline-level="1">2　緒論</text:h>
      <text:h text:style-name="P26" text:outline-level="2">2.1　研究背景與動機</text:h>
      <text:p text:style-name="P10">腦瘤的早期診斷對治療成效影響甚鉅，而磁振造影是臨床上判讀腦部病灶的主要工具。傳統上 MRI 影像的判讀高度仰賴放射科醫師的專業與經驗，不僅耗時，且在醫療資源不足的地區容易形成瓶頸。近年深度學習在醫療影像領域取得顯著進展，以電腦輔助診斷減輕醫師負擔、提升判讀一致性，具有實際的臨床價值與研究意義。</text:p>
      <text:p text:style-name="P10">然而醫療 AI 的應用不僅要求高準確率，更要求模型判斷可被理解與信任。僅輸出結果卻無法說明依據的黑盒子模型難以獲得臨床採用，因此本專題在追求分類效能之外，特別重視模型的可解釋性。</text:p>
      <text:h text:style-name="P26" text:outline-level="2">2.2　問題定義</text:h>
      <text:p text:style-name="P10">本研究定義為四類別影像分類問題：給定一張腦部 MRI 切片影像，模型需將其歸類為 glioma、meningioma、pituitary 或 no tumor 其中之一。輸入為單張 MRI 影像，輸出為四類別上的機率分布，取最高機率者為預測結果。</text:p>
      <text:h text:style-name="P26" text:outline-level="2">2.3　研究目標與貢獻</text:h>
      <text:list text:style-name="WWNum2">
        <text:list-item text:start-value="1">
          <text:p text:style-name="P30">建立完整、可重現的腦瘤 MRI 四分類流程，涵蓋資料前處理、模型訓練、評估與可解釋性分析。</text:p>
        </text:list-item>
        <text:list-item>
          <text:p text:style-name="P30">系統性比較不同 CNN 架構在此任務上的效能與效率取捨，為模型選擇提供實證依據。</text:p>
        </text:list-item>
        <text:list-item>
          <text:p text:style-name="P30">驗證遷移學習與兩階段微調相對於從頭訓練的優勢，並量化預訓練帶來的效益。</text:p>
        </text:list-item>
        <text:list-item>
          <text:p text:style-name="P30">以 Grad-CAM 提供模型判斷的可解釋性證據，並透過逐類別與失敗案例分析檢視模型侷限。</text:p>
        </text:list-item>
      </text:list>
      <text:h text:style-name="P28" text:outline-level="1">3　相關研究</text:h>
      <text:h text:style-name="P26" text:outline-level="2">3.1　卷積神經網路架構演進</text:h>
      <text:p text:style-name="P7"><text:span text:style-name="T5">自 LeCun 等人於 1998 年提出 LeNet-5 以來，卷積神經網路歷經多次架構突破。2012 年 AlexNet 以深層網路與 ReLU、Dropout 在 ImageNet 競賽奪冠；VGG 以堆疊小卷積核強調深度；ResNet 於 2016 年提出殘差連接，解決深層網路的梯度消失問題；DenseNet 讓每一層接</text:span><text:soft-page-break/><text:span text:style-name="T5">收前面所有層的特徵圖，強化特徵重用；EfficientNet 以複合縮放法則在準確率與運算量間取得更佳平衡。本專題選用 ResNet50、DenseNet121 與 EfficientNet-B0 作為骨幹，正是為了比較這三種代表性設計理念在醫療影像上的表現。</text:span></text:p>
      <text:h text:style-name="P26" text:outline-level="2">3.2　遷移學習</text:h>
      <text:p text:style-name="P10">醫療影像資料標註成本高、樣本量有限，難以支撐大型網路從頭訓練。遷移學習透過在大規模資料集（如 ImageNet）上預訓練的模型，將通用視覺特徵遷移至目標任務。實務上常見兩階段策略：先凍結骨幹、僅訓練分類頭，待其穩定後再以極小學習率解凍骨幹整體微調，兼顧收斂穩定與特徵適配。</text:p>
      <text:h text:style-name="P26" text:outline-level="2">3.3　模型可解釋性與 Grad-CAM</text:h>
      <text:p text:style-name="P10">Grad-CAM 由 Selvaraju 等人於 2017 年提出，透過計算目標類別分數對最後一層卷積特徵圖的梯度，取梯度全域平均作為各通道權重，加權組合特徵圖得到類別啟動熱力圖，指出模型判斷時所關注的影像區域。此方法不需修改模型結構、適用於各種 CNN，是醫療 AI 可解釋性分析的常用工具。</text:p>
      <text:h text:style-name="P28" text:outline-level="1">4　資料集與實驗設定</text:h>
      <text:h text:style-name="P26" text:outline-level="2">4.1　資料來源與類別</text:h>
      <text:p text:style-name="P10">本專題採用公開的 Brain Tumor MRI Dataset（Kaggle，作者 Masoud Nickparvar），包含四類腦部 MRI 影像並預先切分為訓練集與測試集。測試集在整個訓練與模型選擇過程中完全不使用，僅於最終評估採用；訓練集再依 80/20 比例切出驗證集。測試集為每類別 400 張的平衡分布，如下表。</text:p>
      <table:table table:name="表格1" table:style-name="表格1">
        <table:table-column table:style-name="表格1.A" table:number-columns-repeated="2"/>
        <table:table-header-rows>
          <table:table-row table:style-name="表格1.1">
            <table:table-cell table:style-name="表格1.A1" office:value-type="string">
              <text:p text:style-name="P22">類別</text:p>
            </table:table-cell>
            <table:table-cell table:style-name="表格1.A1" office:value-type="string">
              <text:p text:style-name="P23">測試集樣本數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24">glioma（神經膠質瘤）</text:p>
          </table:table-cell>
          <table:table-cell table:style-name="表格1.B2" office:value-type="string">
            <text:p text:style-name="P25">400</text:p>
          </table:table-cell>
        </table:table-row>
        <table:table-row table:style-name="表格1.1">
          <table:table-cell table:style-name="表格1.A3" office:value-type="string">
            <text:p text:style-name="P24">meningioma（腦膜瘤）</text:p>
          </table:table-cell>
          <table:table-cell table:style-name="表格1.B3" office:value-type="string">
            <text:p text:style-name="P25">400</text:p>
          </table:table-cell>
        </table:table-row>
        <table:table-row table:style-name="表格1.1">
          <table:table-cell table:style-name="表格1.A4" office:value-type="string">
            <text:p text:style-name="P24">pituitary（腦垂體瘤）</text:p>
          </table:table-cell>
          <table:table-cell table:style-name="表格1.B4" office:value-type="string">
            <text:p text:style-name="P25">400</text:p>
          </table:table-cell>
        </table:table-row>
        <table:table-row table:style-name="表格1.1">
          <table:table-cell table:style-name="表格1.A5" office:value-type="string">
            <text:p text:style-name="P24">no tumor（無腫瘤）</text:p>
          </table:table-cell>
          <table:table-cell table:style-name="表格1.B5" office:value-type="string">
            <text:p text:style-name="P25">400</text:p>
          </table:table-cell>
        </table:table-row>
        <table:table-row table:style-name="表格1.1">
          <table:table-cell table:style-name="表格1.A6" office:value-type="string">
            <text:p text:style-name="P24">合計</text:p>
          </table:table-cell>
          <table:table-cell table:style-name="表格1.B6" office:value-type="string">
            <text:p text:style-name="P25">1600</text:p>
          </table:table-cell>
        </table:table-row>
      </table:table>
      <text:p text:style-name="P20">表 4-1　測試集各類別樣本數</text:p>
      <text:h text:style-name="P26" text:outline-level="2">4.2　訓練設定</text:h>
      <text:p text:style-name="P10">所有模型以 224×224 輸入、批次大小 32、Adam 最佳化器訓練，並套用類別權重處理可能的不平衡。遷移學習模型採兩階段微調：第一階段凍結骨幹、以 1e-3 學習率訓練分類頭 10 個 epoch；第二階段解凍骨幹、以 1e-5 學習率微調 15 個 epoch，且微調期間將骨幹的批次正規化層維持推論模式以凍結其統計量。資料擴增僅採不改變診斷語意的幾何變換（水平翻轉、小角度旋轉、輕微縮放）。</text:p>
      <text:h text:style-name="P26" text:outline-level="2">4.3　硬體環境</text:h>
      <text:p text:style-name="P10">訓練於配備 NVIDIA RTX 4070 Super（12GB）的 <text:span text:style-name="T8">Ubuntu </text:span><text:span text:style-name="T9">Linux </text:span>機器進行並以 CUDA 加速，程式以 PyTorch 與 torchvision 實作，具備 CUDA、MPS、CPU 的自動裝置選擇。</text:p>
      <text:p text:style-name="Standard"/>
      <text:h text:style-name="P27" text:outline-level="1">5　實驗結果與分析</text:h>
      <text:h text:style-name="P26" text:outline-level="2">5.1　整體效能比較</text:h>
      <text:p text:style-name="P10">四個模型在測試集上的整體表現如表 5-1。三種遷移學習模型的準確率皆達 90% 以上，最高的 DenseNet121 為 94.0%，相較之下，從頭訓練的 baseline 僅能達到 71.1%，兩者相差高達約 23 個百分點，直接印證了 ImageNet 預訓練特徵成功遷移至醫療影像的巨大效益。三個遷移模型的 macro AUC 均在 0.98 以上，顯示其類別區辨能力都相當強。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header-rows>
          <table:table-row table:style-name="表格2.1">
            <table:table-cell table:style-name="表格2.A1" office:value-type="string">
              <text:p text:style-name="P22">模型</text:p>
            </table:table-cell>
            <table:table-cell table:style-name="表格2.A1" office:value-type="string">
              <text:p text:style-name="P23">測試準確率</text:p>
            </table:table-cell>
            <table:table-cell table:style-name="表格2.A1" office:value-type="string">
              <text:p text:style-name="P23">參數量(M)</text:p>
            </table:table-cell>
            <table:table-cell table:style-name="表格2.A1" office:value-type="string">
              <text:p text:style-name="P23">Macro F1</text:p>
            </table:table-cell>
            <table:table-cell table:style-name="表格2.A1" office:value-type="string">
              <text:p text:style-name="P23">延遲(ms/張)</text:p>
            </table:table-cell>
            <table:table-cell table:style-name="表格2.A1" office:value-type="string">
              <text:p text:style-name="P23">吞吐量(張/秒)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24">DenseNet121</text:p>
          </table:table-cell>
          <table:table-cell table:style-name="表格2.B2" office:value-type="string">
            <text:p text:style-name="P25">0.9400</text:p>
          </table:table-cell>
          <table:table-cell table:style-name="表格2.C2" office:value-type="string">
            <text:p text:style-name="P25">6.96</text:p>
          </table:table-cell>
          <table:table-cell table:style-name="表格2.D2" office:value-type="string">
            <text:p text:style-name="P25">0.9384</text:p>
          </table:table-cell>
          <table:table-cell table:style-name="表格2.E2" office:value-type="string">
            <text:p text:style-name="P25">10.29</text:p>
          </table:table-cell>
          <table:table-cell table:style-name="表格2.F2" office:value-type="string">
            <text:p text:style-name="P25">1120.5</text:p>
          </table:table-cell>
        </table:table-row>
        <table:table-row table:style-name="表格2.1">
          <table:table-cell table:style-name="表格2.A3" office:value-type="string">
            <text:p text:style-name="P24">ResNet50</text:p>
          </table:table-cell>
          <table:table-cell table:style-name="表格2.B3" office:value-type="string">
            <text:p text:style-name="P25">0.9350</text:p>
          </table:table-cell>
          <table:table-cell table:style-name="表格2.C3" office:value-type="string">
            <text:p text:style-name="P25">23.52</text:p>
          </table:table-cell>
          <table:table-cell table:style-name="表格2.D3" office:value-type="string">
            <text:p text:style-name="P25">0.9334</text:p>
          </table:table-cell>
          <table:table-cell table:style-name="表格2.E3" office:value-type="string">
            <text:p text:style-name="P25">4.04</text:p>
          </table:table-cell>
          <table:table-cell table:style-name="表格2.F3" office:value-type="string">
            <text:p text:style-name="P25">1153.2</text:p>
          </table:table-cell>
        </table:table-row>
        <table:table-row table:style-name="表格2.1">
          <table:table-cell table:style-name="表格2.A4" office:value-type="string">
            <text:p text:style-name="P24">EfficientNet-B0</text:p>
          </table:table-cell>
          <table:table-cell table:style-name="表格2.B4" office:value-type="string">
            <text:p text:style-name="P25">0.9019</text:p>
          </table:table-cell>
          <table:table-cell table:style-name="表格2.C4" office:value-type="string">
            <text:p text:style-name="P25">4.01</text:p>
          </table:table-cell>
          <table:table-cell table:style-name="表格2.D4" office:value-type="string">
            <text:p text:style-name="P25">0.8999</text:p>
          </table:table-cell>
          <table:table-cell table:style-name="表格2.E4" office:value-type="string">
            <text:p text:style-name="P25">5.14</text:p>
          </table:table-cell>
          <table:table-cell table:style-name="表格2.F4" office:value-type="string">
            <text:p text:style-name="P25">2785.4</text:p>
          </table:table-cell>
        </table:table-row>
        <table:table-row table:style-name="表格2.1">
          <table:table-cell table:style-name="表格2.A5" office:value-type="string">
            <text:p text:style-name="P24">baseline</text:p>
          </table:table-cell>
          <table:table-cell table:style-name="表格2.B5" office:value-type="string">
            <text:p text:style-name="P25">0.7113</text:p>
          </table:table-cell>
          <table:table-cell table:style-name="表格2.C5" office:value-type="string">
            <text:p text:style-name="P25">0.09</text:p>
          </table:table-cell>
          <table:table-cell table:style-name="表格2.D5" office:value-type="string">
            <text:p text:style-name="P25">0.7049</text:p>
          </table:table-cell>
          <table:table-cell table:style-name="表格2.E5" office:value-type="string">
            <text:p text:style-name="P25">0.36</text:p>
          </table:table-cell>
          <table:table-cell table:style-name="表格2.F5" office:value-type="string">
            <text:p text:style-name="P25">3602.7</text:p>
          </table:table-cell>
        </table:table-row>
      </table:table>
      <text:p text:style-name="P20">表 5-1　四個模型的整體效能比較</text:p>
      <text:p text:style-name="P10">效率面呈現明顯的取捨。DenseNet121 以最高準確率搭配僅 6.96M 的參數量（遠小於 ResNet50 的 23.52M），呼應其特徵重用、參數效率高的設計；但其單張延遲最高（10.29ms），源於密集連接較密集的記憶體存取。ResNet50 準確率幾乎相同（93.5%）而單張延遲最低（4.04ms）。EfficientNet-B0 準確率略低（90.2%），卻擁有最小的參數量與最高的批次吞吐量（2785 張/秒），是效率取向的代表。值得注意的是，延遲（batch=1 單張推論）與吞吐量（batch=32 批次處理）衡量不同情境，故 DenseNet121 雖單張最慢，批次吞吐量並非最低。</text:p>
      <text:h text:style-name="P26" text:outline-level="2">5.2　訓練與收斂行為</text:h>
      <text:p text:style-name="P10">圖 5-1 疊合四個模型的驗證損失與準確率。三個遷移學習模型平順收斂至約 0.95 以上，而 baseline 的驗證曲線劇烈震盪、損失甚至向上發散，最終於第 10 個 epoch 附近觸發早停。</text:p>
      <text:p text:style-name="P1"><draw:frame draw:style-name="fr1" draw:name="影像1" text:anchor-type="as-char" svg:width="15.24cm" svg:height="5.715cm" draw:z-index="0"><draw:image xlink:href="Pictures/1000000100000708000002A39EB9CD1A.png" xlink:type="simple" xlink:show="embed" xlink:actuate="onLoad" draw:mime-type="image/png"/></draw:frame></text:p>
      <text:p text:style-name="P20">圖 5-1　四個模型的驗證損失（左）與驗證準確率（右）</text:p>
      <text:p text:style-name="P10">baseline 的個別曲線（圖 5-2）進一步揭示問題：訓練準確率穩定上升至約 0.74，驗證表現卻大幅波動且至後期開始崩壞、驗證損失飆升。這是小資料集上從頭訓練典型的過擬合與訓練不穩，凸顯了預訓練所提供的良好初始特徵的重要性。</text:p>
      <text:p text:style-name="P1"><text:soft-page-break/><draw:frame draw:style-name="fr1" draw:name="影像2" text:anchor-type="as-char" svg:width="15.24cm" svg:height="5.715cm" draw:z-index="1"><draw:image xlink:href="Pictures/1000000100000708000002A3F0654303.png" xlink:type="simple" xlink:show="embed" xlink:actuate="onLoad" draw:mime-type="image/png"/></draw:frame></text:p>
      <text:p text:style-name="P20">圖 5-2　baseline 的訓練 / 驗證曲線（過擬合明顯）</text:p>
      <text:p text:style-name="P10">相對地，DenseNet121 的曲線（圖 5-3）平順且穩定。特別是在標示「fine-tune」的解凍微調起點之後，驗證準確率由約 0.88 明顯躍升至 0.95 以上、損失同步快速下降，直觀呈現了兩階段微調的效果——第二階段解凍骨幹讓預訓練特徵得以適配腦瘤影像。ResNet50 與 EfficientNet-B0 亦有相同的躍升現象。</text:p>
      <text:p text:style-name="P1"><draw:frame draw:style-name="fr1" draw:name="影像3" text:anchor-type="as-char" svg:width="15.24cm" svg:height="5.715cm" draw:z-index="2"><draw:image xlink:href="Pictures/1000000100000708000002A3255F0327.png" xlink:type="simple" xlink:show="embed" xlink:actuate="onLoad" draw:mime-type="image/png"/></draw:frame></text:p>
      <text:p text:style-name="P20">圖 5-3　DenseNet121 的訓練 / 驗證曲線，解凍微調後效能明顯躍升</text:p>
      <text:h text:style-name="P26" text:outline-level="2">5.3　逐類別表現與混淆矩陣</text:h>
      <text:p text:style-name="P12">整體準確率之外，逐類別分析更能揭示模型的行為。表 5-2 整理四個模型對各類別的召回率。觀察各類別的表現可以發現，所有模型的共通點是：glioma 是最難辨識的類別，即使最佳的 DenseNet121 其 glioma 召回率也僅 79.2%，而 no tumor 與 pituitary 則接近完美。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B"/>
        <table:table-column table:style-name="表格3.E"/>
        <table:table-header-rows>
          <table:table-row table:style-name="表格3.1">
            <table:table-cell table:style-name="表格3.A1" office:value-type="string">
              <text:p text:style-name="P22">類別</text:p>
            </table:table-cell>
            <table:table-cell table:style-name="表格3.A1" office:value-type="string">
              <text:p text:style-name="P23">baseline</text:p>
            </table:table-cell>
            <table:table-cell table:style-name="表格3.A1" office:value-type="string">
              <text:p text:style-name="P23">ResNet50</text:p>
            </table:table-cell>
            <table:table-cell table:style-name="表格3.A1" office:value-type="string">
              <text:p text:style-name="P23">DenseNet121</text:p>
            </table:table-cell>
            <table:table-cell table:style-name="表格3.A1" office:value-type="string">
              <text:p text:style-name="P23">EfficientNet-B0</text:p>
            </table:table-cell>
          </table:table-row>
        </table:table-header-rows>
        <table:table-row table:style-name="表格3.1">
          <table:table-cell table:style-name="表格3.A2" office:value-type="string">
            <text:p text:style-name="P24">glioma</text:p>
          </table:table-cell>
          <table:table-cell table:style-name="表格3.B2" office:value-type="string">
            <text:p text:style-name="P25">52.2%</text:p>
          </table:table-cell>
          <table:table-cell table:style-name="表格3.C2" office:value-type="string">
            <text:p text:style-name="P25">79.0%</text:p>
          </table:table-cell>
          <table:table-cell table:style-name="表格3.D2" office:value-type="string">
            <text:p text:style-name="P25">79.2%</text:p>
          </table:table-cell>
          <table:table-cell table:style-name="表格3.E2" office:value-type="string">
            <text:p text:style-name="P25">73.0%</text:p>
          </table:table-cell>
        </table:table-row>
        <table:table-row table:style-name="表格3.1">
          <table:table-cell table:style-name="表格3.A3" office:value-type="string">
            <text:p text:style-name="P24">meningioma</text:p>
          </table:table-cell>
          <table:table-cell table:style-name="表格3.B3" office:value-type="string">
            <text:p text:style-name="P25">59.8%</text:p>
          </table:table-cell>
          <table:table-cell table:style-name="表格3.C3" office:value-type="string">
            <text:p text:style-name="P25">95.0%</text:p>
          </table:table-cell>
          <table:table-cell table:style-name="表格3.D3" office:value-type="string">
            <text:p text:style-name="P25">98.0%</text:p>
          </table:table-cell>
          <table:table-cell table:style-name="表格3.E3" office:value-type="string">
            <text:p text:style-name="P25">90.8%</text:p>
          </table:table-cell>
        </table:table-row>
        <table:table-row table:style-name="表格3.1">
          <table:table-cell table:style-name="表格3.A4" office:value-type="string">
            <text:p text:style-name="P24">no tumor</text:p>
          </table:table-cell>
          <table:table-cell table:style-name="表格3.B4" office:value-type="string">
            <text:p text:style-name="P25">94.8%</text:p>
          </table:table-cell>
          <table:table-cell table:style-name="表格3.C4" office:value-type="string">
            <text:p text:style-name="P25">100.0%</text:p>
          </table:table-cell>
          <table:table-cell table:style-name="表格3.D4" office:value-type="string">
            <text:p text:style-name="P25">99.8%</text:p>
          </table:table-cell>
          <table:table-cell table:style-name="表格3.E4" office:value-type="string">
            <text:p text:style-name="P25">100.0%</text:p>
          </table:table-cell>
        </table:table-row>
        <table:table-row table:style-name="表格3.1">
          <table:table-cell table:style-name="表格3.A5" office:value-type="string">
            <text:p text:style-name="P24">pituitary</text:p>
          </table:table-cell>
          <table:table-cell table:style-name="表格3.B5" office:value-type="string">
            <text:p text:style-name="P25">77.8%</text:p>
          </table:table-cell>
          <table:table-cell table:style-name="表格3.C5" office:value-type="string">
            <text:p text:style-name="P25">100.0%</text:p>
          </table:table-cell>
          <table:table-cell table:style-name="表格3.D5" office:value-type="string">
            <text:p text:style-name="P25">99.0%</text:p>
          </table:table-cell>
          <table:table-cell table:style-name="表格3.E5" office:value-type="string">
            <text:p text:style-name="P25">97.0%</text:p>
          </table:table-cell>
        </table:table-row>
      </table:table>
      <text:p text:style-name="P20">表 5-2　各模型逐類別召回率</text:p>
      <text:p text:style-name="P7"><text:span text:style-name="T5">圖 5-4 的混淆矩陣顯示了誤判的流向。在三個遷移學習模型中，glioma 的錯誤主要流向 meningioma 與 no tumor；以 DenseNet121 為例，400 張 glioma 中有 49 張被判為 </text:span><text:soft-page-break/><text:span text:style-name="T5">meningioma、30 張被判為 no tumor。相對地，no tumor 幾乎不會被誤判，ResNet50 甚至對 no tumor 與 pituitary 達到 100% 召回。baseline 則在各類別都有大量混淆，尤以 glioma 與 meningioma 最為嚴重。</text:span></text:p>
      <table:table table:name="表格4" table:style-name="表格4">
        <table:table-column table:style-name="表格4.A" table:number-columns-repeated="2"/>
        <table:table-row table:style-name="表格4.1">
          <table:table-cell table:style-name="表格4.A1" office:value-type="string">
            <text:p text:style-name="P2"><draw:frame draw:style-name="fr1" draw:name="影像4" text:anchor-type="as-char" svg:width="6.826cm" svg:height="5.689cm" draw:z-index="3"><draw:image xlink:href="Pictures/1000000100000384000002EEAC21BA79.png" xlink:type="simple" xlink:show="embed" xlink:actuate="onLoad" draw:mime-type="image/png"/></draw:frame></text:p>
            <text:p text:style-name="P21">DenseNet121（最佳）</text:p>
          </table:table-cell>
          <table:table-cell table:style-name="表格4.A1" office:value-type="string">
            <text:p text:style-name="P2"><draw:frame draw:style-name="fr1" draw:name="影像5" text:anchor-type="as-char" svg:width="6.826cm" svg:height="5.689cm" draw:z-index="4"><draw:image xlink:href="Pictures/1000000100000384000002EE3BF08EEA.png" xlink:type="simple" xlink:show="embed" xlink:actuate="onLoad" draw:mime-type="image/png"/></draw:frame></text:p>
            <text:p text:style-name="P21">ResNet50</text:p>
          </table:table-cell>
        </table:table-row>
        <table:table-row table:style-name="表格4.1">
          <table:table-cell table:style-name="表格4.A1" office:value-type="string">
            <text:p text:style-name="P2"><draw:frame draw:style-name="fr1" draw:name="影像6" text:anchor-type="as-char" svg:width="6.826cm" svg:height="5.689cm" draw:z-index="5"><draw:image xlink:href="Pictures/1000000100000384000002EE045AF48B.png" xlink:type="simple" xlink:show="embed" xlink:actuate="onLoad" draw:mime-type="image/png"/></draw:frame></text:p>
            <text:p text:style-name="P21">EfficientNet-B0</text:p>
          </table:table-cell>
          <table:table-cell table:style-name="表格4.A1" office:value-type="string">
            <text:p text:style-name="P2"><draw:frame draw:style-name="fr1" draw:name="影像7" text:anchor-type="as-char" svg:width="6.826cm" svg:height="5.689cm" draw:z-index="6"><draw:image xlink:href="Pictures/1000000100000384000002EE5528F487.png" xlink:type="simple" xlink:show="embed" xlink:actuate="onLoad" draw:mime-type="image/png"/></draw:frame></text:p>
            <text:p text:style-name="P21">baseline</text:p>
          </table:table-cell>
        </table:table-row>
      </table:table>
      <text:p text:style-name="P20">圖 5-4　四個模型的混淆矩陣</text:p>
      <text:h text:style-name="P26" text:outline-level="2">5.4　ROC 分析</text:h>
      <text:p text:style-name="P10">圖 5-5 為 DenseNet121 的一對其餘 ROC 曲線。no tumor 與 pituitary 的 AUC 分別達 0.999 與 1.000，meningioma 為 0.992，而 glioma 最低（0.947）。此排序與逐類別召回率一致，再次確認 glioma 是最具挑戰性的類別。ResNet50 與 EfficientNet-B0 呈現相同趨勢，glioma 的 AUC 約 0.945–0.947，明顯低於其他三類。</text:p>
      <text:p text:style-name="P1"><text:soft-page-break/><draw:frame draw:style-name="fr1" draw:name="影像8" text:anchor-type="as-char" svg:width="11.377cm" svg:height="9.472cm" draw:z-index="7"><draw:image xlink:href="Pictures/1000000100000384000002EE4DB4F3EE.png" xlink:type="simple" xlink:show="embed" xlink:actuate="onLoad" draw:mime-type="image/png"/></draw:frame></text:p>
      <text:p text:style-name="P20">圖 5-5　DenseNet121 的一對其餘（OvR）ROC 曲線</text:p>
      <text:h text:style-name="P26" text:outline-level="2">5.5　可解釋性分析（Grad-CAM）</text:h>
      <text:p text:style-name="P10">圖 5-6 為 DenseNet121 對四個類別各一張代表性樣本的 Grad-CAM 熱力圖。整體而言，模型的關注區域集中於腦實質而非影像邊緣的背景，顯示其判斷依據落在有意義的組織區域，而非受背景雜訊或影像邊界影響。</text:p>
      <table:table table:name="表格5" table:style-name="表格5">
        <table:table-column table:style-name="表格5.A" table:number-columns-repeated="2"/>
        <table:table-row table:style-name="表格5.1">
          <table:table-cell table:style-name="表格5.A1" office:value-type="string">
            <text:p text:style-name="P2"><draw:frame draw:style-name="fr1" draw:name="影像9" text:anchor-type="as-char" svg:width="7.091cm" svg:height="3.545cm" draw:z-index="8"><draw:image xlink:href="Pictures/10000001000004B0000002583E003496.png" xlink:type="simple" xlink:show="embed" xlink:actuate="onLoad" draw:mime-type="image/png"/></draw:frame></text:p>
            <text:p text:style-name="P21">glioma</text:p>
          </table:table-cell>
          <table:table-cell table:style-name="表格5.A1" office:value-type="string">
            <text:p text:style-name="P2"><draw:frame draw:style-name="fr1" draw:name="影像10" text:anchor-type="as-char" svg:width="7.091cm" svg:height="3.545cm" draw:z-index="9"><draw:image xlink:href="Pictures/10000001000004B0000002583379272B.png" xlink:type="simple" xlink:show="embed" xlink:actuate="onLoad" draw:mime-type="image/png"/></draw:frame></text:p>
            <text:p text:style-name="P21">meningioma</text:p>
          </table:table-cell>
        </table:table-row>
        <table:table-row table:style-name="表格5.1">
          <table:table-cell table:style-name="表格5.A1" office:value-type="string">
            <text:p text:style-name="P2"><draw:frame draw:style-name="fr1" draw:name="影像11" text:anchor-type="as-char" svg:width="7.091cm" svg:height="3.545cm" draw:z-index="10"><draw:image xlink:href="Pictures/10000001000004B0000002582B061145.png" xlink:type="simple" xlink:show="embed" xlink:actuate="onLoad" draw:mime-type="image/png"/></draw:frame></text:p>
            <text:p text:style-name="P21">no tumor</text:p>
          </table:table-cell>
          <table:table-cell table:style-name="表格5.A1" office:value-type="string">
            <text:p text:style-name="P2"><draw:frame draw:style-name="fr1" draw:name="影像12" text:anchor-type="as-char" svg:width="7.091cm" svg:height="3.545cm" draw:z-index="11"><draw:image xlink:href="Pictures/10000001000004B0000002580A84C252.png" xlink:type="simple" xlink:show="embed" xlink:actuate="onLoad" draw:mime-type="image/png"/></draw:frame></text:p>
            <text:p text:style-name="P21">pituitary</text:p>
          </table:table-cell>
        </table:table-row>
      </table:table>
      <text:p text:style-name="P20">圖 5-6　DenseNet121 對四個類別的 Grad-CAM 熱力圖</text:p>
      <text:p text:style-name="P7"><text:span text:style-name="T5">逐類別觀察可見，在這幾張正確分類的代表性樣本中，模型多能將注意力聚焦於病灶本身。glioma 樣本的熱區明確集中於中央的環狀強化病灶，pituitary 樣本的熱區落在中央的腫瘤位置，meningioma 樣本的熱區則涵蓋影像中明顯的腫瘤塊；相對地，no tumor 樣本呈現廣泛而分散的關注、並無特定聚焦點，符合「影像中不存在病灶」的情境。一個值得討論的觀察是：即使在 glioma 這類定位清晰的樣本上模型確實關注了腫瘤，glioma 於整體測試集仍是召回率</text:span><text:soft-page-break/><text:span text:style-name="T5">最低的類別，這暗示其辨識困難可能來自形態非典型、或與 meningioma 相近的模稜兩可案例，而非模型未能注意到病灶。最後需說明，Grad-CAM 取自最後一層 7×7 的卷積特徵圖，空間解析度較粗，故熱力圖呈現區塊狀而非像素級的精確輪廓，此為方法本身的固有限制。</text:span></text:p>
      <text:h text:style-name="P28" text:outline-level="1">6　討論</text:h>
      <text:h text:style-name="P26" text:outline-level="2">6.1　glioma 難以辨識的可能原因</text:h>
      <text:p text:style-name="P10">glioma 在所有模型都是最弱的類別，此現象值得深究。其一，本資料集中的 SARTAJ 部分其 glioma 類別過去曾被社群回報存在標註疑慮，若訓練與測試資料中確實混入少量錯標樣本，將直接壓低該類別的可達上限。其二，glioma 在影像上與 meningioma 的形態有時較為相近，加上其病灶位置與外觀變異較大，本身即較難辨識；混淆矩陣中 glioma 主要被誤判為 meningioma 也支持此推論。此發現提醒我們，模型效能的瓶頸有時來自資料本身而非架構，資料品質的檢視應與模型改進並重。</text:p>
      <text:h text:style-name="P26" text:outline-level="2">6.2　準確率與效率的取捨</text:h>
      <text:p text:style-name="P10">三個遷移學習模型代表了不同的取捨點。若以準確率優先，DenseNet121 是最佳選擇，且其參數量意外地小；若部署情境重視單張即時反應，ResNet50 的低延遲較具優勢；若受限於記憶體或需高吞吐批次處理，EfficientNet-B0 最為輕量高效。實務上的模型選擇應依部署需求而定，而非一味追求最高準確率。</text:p>
      <text:h text:style-name="P26" text:outline-level="2">6.3　兩階段微調的有效性</text:h>
      <text:p text:style-name="P10">訓練曲線清楚顯示，三個遷移模型在解凍骨幹進行第二階段微調後，驗證準確率均出現明顯躍升。這驗證了兩階段策略的價值：第一階段先讓隨機初始化的分類頭穩定，避免大梯度破壞預訓練特徵；第二階段再以極小學習率微調整體。同時，微調期間凍結批次正規化統計量的作法，也協助了小資料集上的穩定收斂。</text:p>
      <text:h text:style-name="P26" text:outline-level="2">6.4　限制與未來工作</text:h>
      <text:list text:continue-numbering="true" text:style-name="WWNum2">
        <text:list-item>
          <text:p text:style-name="P30">資料品質：應對 glioma 類別進行系統性的標註核對與清理，並重新評估其影響。</text:p>
        </text:list-item>
        <text:list-item>
          <text:p text:style-name="P30">消融實驗：可進一步量化資料擴增、類別權重、批次正規化凍結各自的貢獻。</text:p>
        </text:list-item>
        <text:list-item>
          <text:p text:style-name="P30">外部驗證：於獨立來源的資料集上測試，以檢驗模型的泛化能力。</text:p>
        </text:list-item>
        <text:list-item>
          <text:p text:style-name="P30">可解釋性延伸：對多張、多類別樣本進行 Grad-CAM 分析，並針對誤判樣本檢視模型關注區域是否偏移。</text:p>
        </text:list-item>
      </text:list>
      <text:h text:style-name="P28" text:outline-level="1">7　結論</text:h>
      <text:p text:style-name="P11">本專題完成了一套完整的腦部 MRI 腫瘤四分類流程，並透過系統性比較得出明確結論：遷移學習相較從頭訓練帶來約 23 個百分點的準確率提升，最佳的 DenseNet121 達到 94.0% 準確率與 0.985 macro AUC，並在準確率與參數效率間取得最佳平衡。逐類別分析揭示 glioma 為一致的辨識瓶頸，且此瓶頸很可能源自資料標註品質而非模型架構，凸顯資料處理的重要性。訓練曲線驗證了兩階段微調的效果，達成高準確率的分類目標。Grad-CAM 則為模型判斷的合理性提供了可解釋性佐證。</text:p>
      <text:p text:style-name="P11"/>
      <text:h text:style-name="P28" text:outline-level="1"><text:soft-page-break/>8　程式碼可得性</text:h>
      <text:p text:style-name="P11">本專題的完整實作程式碼（資料處理、模型訓練、評估、架構比較與 Grad-CAM）已開源，以利重現與延伸：<text:a xlink:type="simple" xlink:href="https://github.com/TzuShane/DeepLearning_FinalProject_TumorClassification" text:style-name="Internet_20_link" text:visited-style-name="Visited_20_Internet_20_Link">https://github.com/TzuShane/DeepLearning_FinalProject_TumorClassification</text:a>。所使用之資料集為公開的 Brain Tumor MRI Dataset（Kaggle）。</text:p>
      <text:h text:style-name="P29" text:outline-level="1"><text:span text:style-name="T1">參考文獻</text:span></text:h>
      <text:p text:style-name="P16">[1] LeCun, Y., Bottou, L., Bengio, Y., &amp; Haffner, P. (1998). Gradient-based learning applied to document recognition. Proceedings of the IEEE, 86(11), 2278–2324.</text:p>
      <text:p text:style-name="P16">[2] Krizhevsky, A., Sutskever, I., &amp; Hinton, G. E. (2012). ImageNet classification with deep convolutional neural networks. NeurIPS.</text:p>
      <text:p text:style-name="P16">[3] Simonyan, K., &amp; Zisserman, A. (2015). Very deep convolutional networks for large-scale image recognition. ICLR.</text:p>
      <text:p text:style-name="P16">[4] He, K., Zhang, X., Ren, S., &amp; Sun, J. (2016). Deep residual learning for image recognition. CVPR.</text:p>
      <text:p text:style-name="P16">[5] Huang, G., Liu, Z., van der Maaten, L., &amp; Weinberger, K. Q. (2017). Densely connected convolutional networks. CVPR.</text:p>
      <text:p text:style-name="P16">[6] Tan, M., &amp; Le, Q. (2019). EfficientNet: Rethinking model scaling for convolutional neural networks. ICML.</text:p>
      <text:p text:style-name="P16">[7] Selvaraju, R. R., Cogswell, M., Das, A., Vedantam, R., Parikh, D., &amp; Batra, D. (2017). Grad-CAM: Visual explanations from deep networks via gradient-based localization. ICCV.</text:p>
      <text:p text:style-name="P16">[8] Nickparvar, M. (2021). Brain Tumor MRI Dataset. Kaggl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Microsoft JhengHei" fo:font-size="11pt" fo:language="en" fo:country="US" style:letter-kerning="false" style:font-name-asian="Microsoft JhengHei1" style:font-size-asian="11pt" style:language-asian="zh" style:country-asian="TW" style:font-name-complex="Microsoft JhengHe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Microsoft JhengHei" fo:font-size="11pt" fo:language="en" fo:country="US" style:letter-kerning="false" style:font-name-asian="Microsoft JhengHei1" style:font-size-asian="11pt" style:language-asian="zh" style:country-asian="TW" style:font-name-complex="Microsoft JhengHe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1" style:font-family-asian="'Noto Sans CJK TC'" style:font-family-generic-asian="system" style:font-pitch-asian="variable" style:font-size-asian="14pt" style:font-name-complex="Noto Sans CJK TC1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TC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" style:font-family-complex="'Noto Sans CJK TC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459cm" fo:margin-left="0.811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腦部 MRI 腫瘤分類成果報告</dc:title>
    <meta:initial-creator>Deep Learning Final Project</meta:initial-creator>
    <meta:editing-cycles>10</meta:editing-cycles>
    <meta:creation-date>2026-07-04T21:42:44.032000000</meta:creation-date>
    <dc:date>2026-07-05T07:46:32.830750232</dc:date>
    <meta:editing-duration>PT23M52S</meta:editing-duration>
    <meta:generator>LibreOffice/24.2.7.2$Linux_X86_64 LibreOffice_project/420$Build-2</meta:generator>
    <meta:print-date>2026-07-05T06:16:56.799139548</meta:print-date>
    <meta:printed-by>PDF 檔案</meta:printed-by>
    <meta:document-statistic meta:table-count="5" meta:image-count="12" meta:object-count="0" meta:page-count="10" meta:paragraph-count="201" meta:word-count="4609" meta:character-count="7763" meta:non-whitespace-character-count="7187"/>
  </office:meta>
</office:document-meta>
</file>